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2a6099" fo:border="0.74pt solid #000000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5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5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verlap</text:p>
          </table:table-cell>
          <table:table-cell office:value-type="string" calcext:value-type="string">
            <text:p>Integer (bool)</text:p>
          </table:table-cell>
          <table:table-cell table:style-name="ce24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3"/>
          <table:table-cell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5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5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2">Crop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cropName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/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table:style-name="ce14" office:value-type="string" calcext:value-type="string">
            <text:p>BoxT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T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21" office:value-type="string" calcext:value-type="string">
            <text:p>PredUuid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1" office:value-type="string" calcext:value-type="string">
            <text:p>globalKey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5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6:14:07.306522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21T17:20:58.519321319</dc:date>
    <meta:editing-duration>PT19H48M49S</meta:editing-duration>
    <meta:editing-cycles>22</meta:editing-cycles>
    <meta:generator>LibreOffice/24.8.4.2$Linux_X86_64 LibreOffice_project/480$Build-2</meta:generator>
    <meta:document-statistic meta:table-count="1" meta:cell-count="97" meta:object-count="0"/>
  </office:meta>
</office:document-meta>
</file>